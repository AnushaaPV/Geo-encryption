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0ed792" officeooo:paragraph-rsid="000ed792" fo:background-color="transparent"/>
    </style:style>
    <style:style style:name="P2" style:family="paragraph" style:parent-style-name="Standard">
      <style:paragraph-properties fo:text-align="start" style:justify-single-word="false"/>
      <style:text-properties fo:color="#000000" loext:opacity="100%" officeooo:rsid="000ed792" officeooo:paragraph-rsid="000ed792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loext:opacity="100%" officeooo:rsid="000ed792" officeooo:paragraph-rsid="000ed792" fo:background-color="#00ffff"/>
    </style:style>
    <style:style style:name="P4" style:family="paragraph" style:parent-style-name="Standard">
      <style:text-properties fo:color="#000000" loext:opacity="100%" fo:font-size="96pt" officeooo:rsid="000ed792" officeooo:paragraph-rsid="000ed792" fo:background-color="transparent" style:font-size-asian="84pt" style:font-size-complex="96pt"/>
    </style:style>
    <style:style style:name="T1" style:family="text">
      <style:text-properties fo:font-size="96pt" fo:background-color="#ffa6a6" loext:char-shading-value="0" style:font-size-asian="84pt" style:font-size-complex="96pt"/>
    </style:style>
    <style:style style:name="T2" style:family="text">
      <style:text-properties fo:font-size="96pt" style:font-size-asian="84pt" style:font-size-complex="96pt"/>
    </style:style>
    <style:style style:name="T3" style:family="text">
      <style:text-properties fo:font-size="96pt" officeooo:rsid="000f4afa" style:font-size-asian="84pt" style:font-size-complex="96pt"/>
    </style:style>
    <style:style style:name="T4" style:family="text">
      <style:text-properties fo:font-size="96pt" fo:background-color="#ff4000" loext:char-shading-value="0" style:font-size-asian="84pt" style:font-size-complex="96pt"/>
    </style:style>
    <style:style style:name="T5" style:family="text">
      <style:text-properties fo:font-size="96pt" fo:background-color="#ffff00" loext:char-shading-value="0" style:font-size-asian="84pt" style:font-size-complex="96pt"/>
    </style:style>
    <style:style style:name="T6" style:family="text">
      <style:text-properties fo:font-size="96pt" fo:background-color="#f10d0c" loext:char-shading-value="0" style:font-size-asian="84pt" style:font-size-complex="96pt"/>
    </style:style>
    <style:style style:name="T7" style:family="text">
      <style:text-properties fo:font-size="96pt" fo:background-color="#55215b" loext:char-shading-value="0" style:font-size-asian="84pt" style:font-size-complex="96pt"/>
    </style:style>
    <style:style style:name="T8" style:family="text">
      <style:text-properties fo:font-size="96pt" fo:background-color="#127622" loext:char-shading-value="0" style:font-size-asian="84pt" style:font-size-complex="96pt"/>
    </style:style>
    <style:style style:name="T9" style:family="text">
      <style:text-properties fo:font-size="96pt" officeooo:rsid="000f4afa" fo:background-color="#00a933" loext:char-shading-value="0" style:font-size-asian="84pt" style:font-size-complex="96pt"/>
    </style:style>
    <style:style style:name="T10" style:family="text">
      <style:text-properties fo:font-size="96pt" fo:background-color="#c9211e" loext:char-shading-value="0" style:font-size-asian="84pt" style:font-size-complex="96pt"/>
    </style:style>
    <style:style style:name="T11" style:family="text">
      <style:text-properties fo:font-size="96pt" officeooo:rsid="000f4afa" fo:background-color="#c9211e" loext:char-shading-value="0" style:font-size-asian="84pt" style:font-size-complex="96pt"/>
    </style:style>
    <style:style style:name="T12" style:family="text">
      <style:text-properties fo:font-size="96pt" fo:background-color="#ffd7d7" loext:char-shading-value="0" style:font-size-asian="84pt" style:font-size-complex="96pt"/>
    </style:style>
    <style:style style:name="T13" style:family="text">
      <style:text-properties fo:font-size="96pt" fo:background-color="#650953" loext:char-shading-value="0" style:font-size-asian="84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A</text:span><text:span text:style-name="T5">B</text:span><text:span text:style-name="T6">H</text:span><text:span text:style-name="T7">I</text:span><text:span text:style-name="T8">N</text:span><text:span text:style-name="T1">A</text:span><text:span text:style-name="T9">V</text:span><text:span text:style-name="T2"> </text:span><text:span text:style-name="T11">T</text:span><text:span text:style-name="T10">V</text:span></text:p>
      <text:p text:style-name="P1"><text:span text:style-name="T12">IS</text:span><text:span text:style-name="T13">BEST</text:span><text:span text:style-name="T2"> </text:span></text:p>
      <text:p text:style-name="P3"><text:span text:style-name="T2">G</text:span><text:span text:style-name="T3">UY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3:14:37.684000000</meta:creation-date>
    <dc:date>2021-12-16T19:52:44.996000000</dc:date>
    <meta:editing-duration>PT16M25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" meta:word-count="4" meta:character-count="20" meta:non-whitespace-character-count="18"/>
  </office:meta>
</office:document-meta>
</file>