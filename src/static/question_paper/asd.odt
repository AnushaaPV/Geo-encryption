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24pt" fo:font-weight="normal" officeooo:rsid="00066592" officeooo:paragraph-rsid="0004877a" style:font-size-asian="21pt" style:font-weight-asian="normal" style:font-size-complex="24pt" style:font-weight-complex="normal"/>
    </style:style>
    <style:style style:name="P2" style:family="paragraph" style:parent-style-name="Standard">
      <style:text-properties style:text-line-through-style="none" style:text-line-through-type="none" fo:font-size="36pt" fo:font-weight="normal" officeooo:rsid="00066592" officeooo:paragraph-rsid="0004877a" style:font-size-asian="31.5pt" style:font-weight-asian="normal" style:font-size-complex="36pt" style:font-weight-complex="normal"/>
    </style:style>
    <style:style style:name="P3" style:family="paragraph" style:parent-style-name="Standard">
      <style:text-properties officeooo:paragraph-rsid="0004877a"/>
    </style:style>
    <style:style style:name="P4" style:family="paragraph" style:parent-style-name="Standard">
      <style:text-properties fo:color="#55215b" loext:opacity="100%" style:text-line-through-style="none" style:text-line-through-type="none" fo:font-size="16pt" fo:font-weight="normal" officeooo:rsid="00042fae" officeooo:paragraph-rsid="00042fae" style:font-size-asian="14pt" style:font-weight-asian="normal" style:font-size-complex="16pt" style:font-weight-complex="normal"/>
    </style:style>
    <style:style style:name="P5" style:family="paragraph" style:parent-style-name="Standard">
      <style:text-properties fo:color="#55215b" loext:opacity="100%" style:text-line-through-style="none" style:text-line-through-type="none" fo:font-size="16pt" fo:font-weight="normal" officeooo:rsid="00042fae" style:font-size-asian="14pt" style:font-weight-asian="normal" style:font-size-complex="16pt" style:font-weight-complex="normal"/>
    </style:style>
    <style:style style:name="P6" style:family="paragraph" style:parent-style-name="Standard">
      <style:text-properties fo:color="#55215b" loext:opacity="100%" style:text-line-through-style="none" style:text-line-through-type="none" fo:font-size="16pt" fo:font-weight="normal" officeooo:rsid="0004877a" officeooo:paragraph-rsid="0004877a" style:font-size-asian="14pt" style:font-weight-asian="normal" style:font-size-complex="16pt" style:font-weight-complex="normal"/>
    </style:style>
    <style:style style:name="P7" style:family="paragraph" style:parent-style-name="Standard">
      <style:text-properties fo:color="#ff0000" loext:opacity="100%" style:text-line-through-style="none" style:text-line-through-type="none" fo:font-size="36pt" fo:font-weight="normal" officeooo:rsid="000770fb" officeooo:paragraph-rsid="0004877a" fo:background-color="transparent" style:font-size-asian="31.5pt" style:font-weight-asian="normal" style:font-size-complex="36pt" style:font-weight-complex="normal"/>
    </style:style>
    <style:style style:name="P8" style:family="paragraph">
      <loext:graphic-properties draw:fill="gradient" draw:fill-gradient-name="Present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officeooo:rsid="00066592" style:font-size-asian="21pt" style:font-size-complex="24pt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ff0000" loext:opacity="100%" fo:background-color="transparent" loext:char-shading-value="0"/>
    </style:style>
    <style:style style:name="T5" style:family="text">
      <style:text-properties fo:color="#ff0000" loext:opacity="100%" officeooo:rsid="000770fb" fo:background-color="transparent" loext:char-shading-value="0"/>
    </style:style>
    <style:style style:name="T6" style:family="text">
      <style:text-properties fo:color="#ff0000" loext:opacity="100%" style:text-line-through-style="none" style:text-line-through-type="none" fo:font-size="36pt" fo:font-weight="normal" officeooo:rsid="000770fb" fo:background-color="transparent" loext:char-shading-value="0" style:font-size-asian="31.5pt" style:font-weight-asian="normal" style:font-size-complex="36pt" style:font-weight-complex="normal"/>
    </style:style>
    <style:style style:name="T7" style:family="text">
      <style:text-properties fo:color="#2a6099" loext:opacity="100%" style:text-line-through-style="none" style:text-line-through-type="none" fo:font-size="36pt" fo:font-weight="normal" officeooo:rsid="000770fb" fo:background-color="transparent" loext:char-shading-value="0" style:font-size-asian="31.5pt" style:font-weight-asian="normal" style:font-size-complex="36pt" style:font-weight-complex="normal"/>
    </style:style>
    <style:style style:name="T8" style:family="text">
      <style:text-properties fo:color="#2a6099" loext:opacity="100%" style:text-line-through-style="none" style:text-line-through-type="none" fo:font-size="18pt" fo:font-weight="normal" officeooo:rsid="000770fb" fo:background-color="transparent" loext:char-shading-value="0" style:font-size-asian="15.75pt" style:font-weight-asian="normal" style:font-size-complex="18pt" style:font-weight-complex="normal"/>
    </style:style>
    <style:style style:name="T9" style:family="text">
      <style:text-properties fo:color="#2a6099" loext:opacity="100%" style:text-line-through-style="none" style:text-line-through-type="none" fo:font-size="18pt" fo:font-weight="normal" officeooo:rsid="0009e367" fo:background-color="transparent" loext:char-shading-value="0" style:font-size-asian="15.75pt" style:font-weight-asian="normal" style:font-size-complex="18pt" style:font-weight-complex="normal"/>
    </style:style>
    <style:style style:name="gr1" style:family="graphic">
      <style:graphic-properties draw:fill="gradient" draw:fill-gradient-name="Present" draw:auto-grow-height="false" fo:min-height="0.1102in" fo:min-width="0.491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ar teacher,</text:p>
      <text:p text:style-name="P5"><text:s text:c="9"/>I hope you are fine.Happy teachr’s day</text:p>
      <text:p text:style-name="P4">You are my best leson in my life.Thankyou <text:s/></text:p>
      <text:p text:style-name="P4">for beaing a awesome teacher and to give care</text:p>
      <text:p text:style-name="P6">of a parent.Thanks for your love.Thankyou teacher</text:p>
      <text:p text:style-name="P6">for gaiding us,inspiring us and making a good pearson.</text:p>
      <text:p text:style-name="P6"/>
      <text:p text:style-name="P6"/>
      <text:p text:style-name="P6"><text:s text:c="15"/><text:span text:style-name="T1">THA</text:span><text:span text:style-name="T2">NKYOU..........</text:span></text:p>
      <text:p text:style-name="P1"><text:s text:c="4"/></text:p>
      <text:p text:style-name="P2"><draw:custom-shape text:anchor-type="paragraph" draw:z-index="0" draw:name="Shape 1" draw:style-name="gr1" draw:text-style-name="P8" svg:width="0.6394in" svg:height="0.3406in" svg:x="6.0516in" svg:y="0.1484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T3"><text:s text:c="3"/></text:span><text:span text:style-name="T4">HAPPY TEACHER’S</text:span><text:span text:style-name="T5"> DAY</text:span></text:p>
      <text:p text:style-name="P7"><text:s text:c="31"/></text:p>
      <text:p text:style-name="P3"><text:span text:style-name="T6"><text:s text:c="32"/></text:span><text:span text:style-name="T7"><text:s text:c="4"/></text:span><text:span text:style-name="T8">BY</text:span></text:p>
      <text:p text:style-name="P3"><text:span text:style-name="T8"><text:s text:c="58"/>Abhinav.</text:span><text:span text:style-name="T9">T.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resent" draw:style="square" draw:cx="70%" draw:cy="60%" draw:start-color="#813709" draw:end-color="#ff4000" draw:start-intensity="100%" draw:end-intensity="100%" draw:angle="45deg" draw:border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9:07:48.172000000</meta:creation-date>
    <dc:date>2021-11-11T18:57:32.258000000</dc:date>
    <meta:editing-duration>PT20M37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2" meta:word-count="48" meta:character-count="448" meta:non-whitespace-character-count="252"/>
  </office:meta>
</office:document-meta>
</file>