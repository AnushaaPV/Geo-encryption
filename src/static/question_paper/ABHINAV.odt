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 officeooo:rsid="000e380d" officeooo:paragraph-rsid="000e380d"/>
    </style:style>
    <style:style style:name="P2" style:family="paragraph" style:parent-style-name="Standard">
      <style:text-properties fo:color="#000000" loext:opacity="100%" style:text-underline-style="solid" style:text-underline-width="auto" style:text-underline-color="font-color" officeooo:rsid="000e9635" officeooo:paragraph-rsid="000e9635"/>
    </style:style>
    <style:style style:name="P3" style:family="paragraph" style:parent-style-name="Standard">
      <style:text-properties fo:color="#000000" loext:opacity="100%" fo:font-size="16pt" style:text-underline-style="solid" style:text-underline-width="auto" style:text-underline-color="font-color" officeooo:rsid="000e380d" officeooo:paragraph-rsid="000e380d" style:font-size-asian="16pt" style:font-size-complex="16pt"/>
    </style:style>
    <style:style style:name="P4" style:family="paragraph" style:parent-style-name="Standard">
      <style:text-properties fo:color="#000000" loext:opacity="100%" fo:font-size="16pt" style:text-underline-style="solid" style:text-underline-width="auto" style:text-underline-color="font-color" officeooo:rsid="000e9635" officeooo:paragraph-rsid="000e9635" style:font-size-asian="16pt" style:font-size-complex="16pt"/>
    </style:style>
    <style:style style:name="P5" style:family="paragraph" style:parent-style-name="Standard">
      <style:text-properties fo:color="#000000" loext:opacity="100%" fo:font-size="16pt" style:text-underline-style="solid" style:text-underline-width="auto" style:text-underline-color="font-color" fo:font-weight="bold" officeooo:rsid="000e380d" officeooo:paragraph-rsid="000e380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HINAV T V</text:p>
      <text:p text:style-name="P1"/>
      <text:p text:style-name="P1"><text:span text:style-name="T1">MY NAME IS ABHINAV T V</text:span></text:p>
      <text:p text:style-name="P3">I AM COMING FROM KODANAD</text:p>
      <text:p text:style-name="P3">I HAVE TO SISTERS </text:p>
      <text:p text:style-name="P1"><text:span text:style-name="T1">1ST SISTER NAME IS ARYA T V</text:span></text:p>
      <text:p text:style-name="P1"><text:span text:style-name="T1">SHE IS STUDYING IN DEGRRE</text:span></text:p>
      <text:p text:style-name="P1"><text:span text:style-name="T1">2ND SISTER NAME IS AMRITHA T V</text:span></text:p>
      <text:p text:style-name="P1"><text:span text:style-name="T1">SHE IS STUDYING IN 10TH STANDERD</text:span></text:p>
      <text:p text:style-name="P1"><text:span text:style-name="T1">MY MOTHER NAME IS RAJITHA V R</text:span></text:p>
      <text:p text:style-name="P1"><text:span text:style-name="T1">MY MOTHER IS HOUSE WIFE</text:span></text:p>
      <text:p text:style-name="P2"><text:span text:style-name="T1">MY FATHER NAME IS VELAYUTHAN T</text:span></text:p>
      <text:p text:style-name="P4">MY FATHER IS DRIVER IN DUBA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20:18:45.294000000</meta:creation-date>
    <dc:date>2021-12-16T20:38:42.302000000</dc:date>
    <meta:editing-duration>PT18M3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2" meta:word-count="67" meta:character-count="299" meta:non-whitespace-character-count="243"/>
  </office:meta>
</office:document-meta>
</file>